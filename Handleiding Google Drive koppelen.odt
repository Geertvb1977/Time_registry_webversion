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5%"/>
    </style:style>
    <style:style style:name="P2" style:family="paragraph" style:parent-style-name="Heading_20_2">
      <style:paragraph-properties fo:margin-top="0in" fo:margin-bottom="0.0972in" style:contextual-spacing="false" fo:line-height="115%"/>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Heading_20_3">
      <style:paragraph-properties fo:margin-top="0in" fo:margin-bottom="0.0972in" style:contextual-spacing="false" fo:line-height="115%"/>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andleiding: Google Drive &amp; Documenten koppelen aan je Eventaflow-account</text:h>
      <text:p text:style-name="Text_20_body">Welkom bij de handleiding voor het koppelen van jouw eigen Google Cloud-omgeving aan Eventaflow.</text:p>
      <text:p text:style-name="Text_20_body">Omdat we via deze app documenten en mappen rechtstreeks op jouw eigen Google Drive gaan opslaan, gebruiken we jouw eigen Google-opslagruimte. Hierdoor loop je nooit tegen opslaglimieten aan en behoud je 100% eigenaarschap over al je bestanden!</text:p>
      <text:p text:style-name="Text_20_body">Geen zorgen: je hoeft geen programmeur te zijn om dit in te stellen. Volg simpelweg de onderstaande stappen.</text:p>
      <text:h text:style-name="P2" text:outline-level="2">Stap 1: Voorbereiding (Google Drive)</text:h>
      <text:p text:style-name="Text_20_body">Voordat we beginnen in de technische omgeving, zorgen we dat je Google-account klaar is.</text:p>
      <text:list text:style-name="L1">
        <text:list-item>
          <text:p text:style-name="P3">Zorg dat je bent ingelogd op het Google-account (bijvoorbeeld je zakelijke Google Workspace-account of je persoonlijke <text:span text:style-name="Source_20_Text">@gmail.com</text:span>-account) dat je wilt gebruiken als centrale opslagmap.</text:p>
        </text:list-item>
        <text:list-item>
          <text:p text:style-name="P3">Open <text:a xlink:type="simple" xlink:href="https://drive.google.com/" text:style-name="Internet_20_link" text:visited-style-name="Visited_20_Internet_20_Link">Google Drive</text:a> en zorg dat je toegang hebt.</text:p>
        </text:list-item>
      </text:list>
      <text:h text:style-name="P2" text:outline-level="2">Stap 2: Aanmelden bij Google Cloud Console</text:h>
      <text:p text:style-name="Text_20_body">Google Cloud Console is de beheerdersomgeving waar we toestemming gaan vragen om verbinding te maken.</text:p>
      <text:list text:style-name="L2">
        <text:list-item>
          <text:p text:style-name="P4">Ga naar de <text:a xlink:type="simple" xlink:href="https://console.cloud.google.com/" text:style-name="Internet_20_link" text:visited-style-name="Visited_20_Internet_20_Link">Google Cloud Console</text:a>.</text:p>
        </text:list-item>
        <text:list-item>
          <text:p text:style-name="P4">Log in met hetzelfde Google-account als uit Stap 1.</text:p>
        </text:list-item>
        <text:list-item>
          <text:p text:style-name="P4">Indien dit de eerste keer is dat je de console opent, vraagt Google je akkoord te gaan met de servicevoorwaarden. Vink dit aan en klik op <text:span text:style-name="Strong_20_Emphasis">Akkoord en doorgaan</text:span>.</text:p>
        </text:list-item>
      </text:list>
      <text:h text:style-name="P2" text:outline-level="2">Stap 3: Een nieuw project aanmaken</text:h>
      <text:p text:style-name="Text_20_body">Binnen Google Cloud werken alle koppelingen via een "Project". We maken nu een project aan voor jouw bedrijf.</text:p>
      <text:list text:style-name="L3">
        <text:list-item>
          <text:p text:style-name="P5">Klik linksboven in het scherm (naast het Google Cloud-logo) op het projecten-menu (er staat vaak <text:span text:style-name="Emphasis">"Select a project"</text:span> of een bestaande projectnaam).</text:p>
        </text:list-item>
        <text:list-item>
          <text:p text:style-name="P5">Er opent een venster. Klik rechtsboven in dit venster op de blauwe knop <text:span text:style-name="Strong_20_Emphasis">New Project</text:span> (Nieuw project).</text:p>
        </text:list-item>
        <text:list-item>
          <text:p text:style-name="P5">Vul bij <text:span text:style-name="Strong_20_Emphasis">Project Name</text:span> een herkenbare naam in, bijvoorbeeld: <text:span text:style-name="Source_20_Text">Eventaflow Koppeling</text:span>.</text:p>
        </text:list-item>
        <text:list-item>
          <text:p text:style-name="P5">Laat de overige velden (zoals Organization/Location) ongewijzigd en klik op de blauwe knop <text:span text:style-name="Strong_20_Emphasis">Create</text:span> (Maken).</text:p>
        </text:list-item>
        <text:list-item>
          <text:p text:style-name="P5"><text:soft-page-break/>Wacht een paar seconden tot Google het project heeft aangemaakt. Klik daarna weer linksboven op het projecten-menu en selecteer je zojuist aangemaakte project <text:span text:style-name="Source_20_Text">Eventaflow Koppeling</text:span>.</text:p>
        </text:list-item>
      </text:list>
      <text:h text:style-name="P2" text:outline-level="2">Stap 4: De benodigde Google API's inschakelen</text:h>
      <text:p text:style-name="Text_20_body">API's zijn de "deuren" die we moeten openzetten zodat onze app met jouw Google Drive og Google Docs mag praten.</text:p>
      <text:h text:style-name="P6" text:outline-level="3">De Google Drive API inschakelen:</text:h>
      <text:list text:style-name="L4">
        <text:list-item>
          <text:p text:style-name="P7">Klik linksboven op het menu (de drie liggende streepjes) en ga naar <text:span text:style-name="Strong_20_Emphasis">APIs &amp; Services</text:span> (API's en services) &gt; <text:span text:style-name="Strong_20_Emphasis">Library</text:span> (Bibliotheek).</text:p>
        </text:list-item>
        <text:list-item>
          <text:p text:style-name="P7">Typ in de grote zoekbalk: <text:span text:style-name="Source_20_Text">Google Drive API</text:span> en druk op Enter.</text:p>
        </text:list-item>
        <text:list-item>
          <text:p text:style-name="P7">Klik op het zoekresultaat <text:span text:style-name="Strong_20_Emphasis">Google Drive API</text:span>.</text:p>
        </text:list-item>
        <text:list-item>
          <text:p text:style-name="P7">Klik op de blauwe knop <text:span text:style-name="Strong_20_Emphasis">Enable</text:span> (Inschakelen).</text:p>
        </text:list-item>
      </text:list>
      <text:h text:style-name="P6" text:outline-level="3">De Google Docs API inschakelen:</text:h>
      <text:list text:style-name="L5">
        <text:list-item>
          <text:p text:style-name="P8">Ga via de zoekbalk bovenin het scherm opnieuw op zoek, maar typ nu: <text:span text:style-name="Source_20_Text">Google Docs API</text:span> en druk op Enter.</text:p>
        </text:list-item>
        <text:list-item>
          <text:p text:style-name="P8">Klik op het zoekresultaat <text:span text:style-name="Strong_20_Emphasis">Google Docs API</text:span>.</text:p>
        </text:list-item>
        <text:list-item>
          <text:p text:style-name="P8">Klik op de blauwe knop <text:span text:style-name="Strong_20_Emphasis">Enable</text:span> (Inschakelen).</text:p>
        </text:list-item>
      </text:list>
      <text:h text:style-name="P2" text:outline-level="2">Stap 5: Het OAuth-toestemmingsscherm (OAuth consent screen) inrichten</text:h>
      <text:p text:style-name="Text_20_body">Hier bepalen we wat de gebruiker te zien krijgt als hij/zij op de inlogknop drukt en wie er mag inloggen tijdens de testfase.</text:p>
      <text:list text:style-name="L6">
        <text:list-item>
          <text:p text:style-name="P9">Klik in het linkermenu op <text:span text:style-name="Strong_20_Emphasis">OAuth consent screen</text:span> (OAuth-toestemmingsscherm).</text:p>
        </text:list-item>
        <text:list-item>
          <text:p text:style-name="P9">Kies bij User Type voor <text:span text:style-name="Strong_20_Emphasis">External</text:span> (Extern) en klik op <text:span text:style-name="Strong_20_Emphasis">Create</text:span> (Maken).</text:p>
        </text:list-item>
        <text:list-item>
          <text:p text:style-name="P9">Vul de volgende verplichte velden in op de pagina <text:span text:style-name="Strong_20_Emphasis">App information</text:span>:</text:p>
          <text:list>
            <text:list-item>
              <text:p text:style-name="P9"><text:span text:style-name="Strong_20_Emphasis">App name:</text:span> <text:span text:style-name="Source_20_Text">Eventaflow Documenten</text:span> (Dit zien je medewerkers bij het inloggen).</text:p>
            </text:list-item>
            <text:list-item>
              <text:p text:style-name="P9"><text:span text:style-name="Strong_20_Emphasis">User support email:</text:span> Selecteer jouw eigen e-mailadres in de dropdown.</text:p>
            </text:list-item>
            <text:list-item>
              <text:p text:style-name="P9"><text:span text:style-name="Strong_20_Emphasis">Developer contact information:</text:span> Vul hier nogmaals jouw eigen e-mailadres in.</text:p>
            </text:list-item>
          </text:list>
        </text:list-item>
        <text:list-item>
          <text:p text:style-name="P9">Klik onderaan de pagina op <text:span text:style-name="Strong_20_Emphasis">Save and Continue</text:span> (Opslaan en doorgaan).</text:p>
        </text:list-item>
        <text:list-item>
          <text:p text:style-name="P9">Je komt nu bij de stap <text:span text:style-name="Strong_20_Emphasis">Scopes</text:span>. Je hoeft hier niets aan te passen; klik direct onderaan op <text:span text:style-name="Strong_20_Emphasis">Save and Continue</text:span> (Opslaan en doorgaan).</text:p>
        </text:list-item>
        <text:list-item>
          <text:p text:style-name="P9"><text:soft-page-break/><text:span text:style-name="Strong_20_Emphasis">Belangrijke stap bij 'Test Users' (Doelgroep / Audience):</text:span> Omdat jouw Google-app nog in de ontwerpfase (Testing) staat, laat Google standaard niemand toe, behalve de accounts die je hier handmatig als testgebruiker opgeeft.</text:p>
          <text:list>
            <text:list-item>
              <text:p text:style-name="P9">Je bevindt je nu op de pagina/tabblad genaamd <text:span text:style-name="Strong_20_Emphasis">Audience</text:span> (of onder het kopje <text:span text:style-name="Emphasis">Test Users</text:span>).</text:p>
            </text:list-item>
            <text:list-item>
              <text:p text:style-name="P9">Klik op de knop <text:span text:style-name="Strong_20_Emphasis">+ Add Users</text:span> (Gebruikers toevoegen).</text:p>
            </text:list-item>
            <text:list-item>
              <text:p text:style-name="P9">Vul in het tekstvak jouw eigen Google e-mailadres in (het e-mailadres van de Google Drive die je gaat koppelen).</text:p>
            </text:list-item>
            <text:list-item>
              <text:p text:style-name="P9">Klik op <text:span text:style-name="Strong_20_Emphasis">Add</text:span> (Toevoegen) of <text:span text:style-name="Strong_20_Emphasis">Save</text:span> om de gebruiker op te slaan. Je ziet je e-mailadres nu in de tabel verschijnen.</text:p>
            </text:list-item>
            <text:list-item>
              <text:p text:style-name="P9">Klik onderaan op <text:span text:style-name="Strong_20_Emphasis">Save and Continue</text:span> (Opslaan en doorgaan).</text:p>
            </text:list-item>
          </text:list>
        </text:list-item>
        <text:list-item>
          <text:p text:style-name="P9">Klik op de overzichtspagina ten slotte op <text:span text:style-name="Strong_20_Emphasis">Back to Dashboard</text:span> (Terug naar dashboard).</text:p>
        </text:list-item>
      </text:list>
      <text:h text:style-name="P2" text:outline-level="2">Stap 6: De inloggegevens (Credentials) aanmaken</text:h>
      <text:p text:style-name="Text_20_body">Nu gaan we de daadwerkelijke sleutels genereren die we in de Eventaflow-app moeten plakken.</text:p>
      <text:list text:style-name="L7">
        <text:list-item>
          <text:p text:style-name="P10">Klik in het linkermenu op <text:span text:style-name="Strong_20_Emphasis">APIs &amp; Services</text:span> (API's &amp; services) en kies daarna voor <text:span text:style-name="Strong_20_Emphasis">Credentials</text:span> (Inloggegevens).</text:p>
        </text:list-item>
        <text:list-item>
          <text:p text:style-name="P10">Klik bovenin het scherm op de knop <text:span text:style-name="Strong_20_Emphasis">+ Create Credentials</text:span> (Inloggegevens maken) en kies voor <text:span text:style-name="Strong_20_Emphasis">OAuth client ID</text:span>.</text:p>
        </text:list-item>
        <text:list-item>
          <text:p text:style-name="P10">Selecteer in de dropdown bij <text:span text:style-name="Emphasis">Application type</text:span> de optie <text:span text:style-name="Strong_20_Emphasis">Web application</text:span> (Webtoepassing).</text:p>
        </text:list-item>
        <text:list-item>
          <text:p text:style-name="P10">Vul bij <text:span text:style-name="Strong_20_Emphasis">Name</text:span> een herkenbare naam in, bijvoorbeeld: <text:span text:style-name="Source_20_Text">Eventaflow Client</text:span>.</text:p>
        </text:list-item>
        <text:list-item>
          <text:p text:style-name="P10">Scroll naar beneden naar het kopje <text:span text:style-name="Strong_20_Emphasis">Authorized redirect URIs</text:span> (Geautoriseerde omleidings-URI's).</text:p>
          <text:list>
            <text:list-item>
              <text:p text:style-name="P10"><text:span text:style-name="Emphasis">Let op:</text:span> Dit is de belangrijkste stap! Klik op de knop <text:span text:style-name="Strong_20_Emphasis">+ Add URI</text:span>.</text:p>
            </text:list-item>
            <text:list-item>
              <text:p text:style-name="P10">Kopieer de exacte rode URL die onderaan jouw Eventaflow-instellingenpagina staat (onder het kopje <text:span text:style-name="Emphasis">Google Cloud Console Redirect URI</text:span>).</text:p>
              <text:list>
                <text:list-item>
                  <text:p text:style-name="P10"><text:span text:style-name="Emphasis">Lokaal testvoorbeeld:</text:span> <text:span text:style-name="Source_20_Text">http://127.0.0.1:8000/google/callback/</text:span></text:p>
                </text:list-item>
                <text:list-item>
                  <text:p text:style-name="P10"><text:span text:style-name="Emphasis">Live productievoorbeeld:</text:span> <text:span text:style-name="Source_20_Text">https://jouwapp.nl/google/callback/</text:span></text:p>
                </text:list-item>
              </text:list>
            </text:list-item>
            <text:list-item>
              <text:p text:style-name="P10">Plak deze URL in het invoerveld bij Google.</text:p>
            </text:list-item>
          </text:list>
        </text:list-item>
        <text:list-item>
          <text:p text:style-name="P10">Klik onderaan op de blauwe knop <text:span text:style-name="Strong_20_Emphasis">Create</text:span> (Maken).</text:p>
        </text:list-item>
      </text:list>
      <text:p text:style-name="Text_20_body">Google toont nu een pop-up met twee unieke codes:</text:p>
      <text:list text:style-name="L8">
        <text:list-item>
          <text:p text:style-name="P11"><text:span text:style-name="Strong_20_Emphasis">Your Client ID</text:span> (Een lange reeks letters en cijfers eindigend op <text:span text:style-name="Source_20_Text">.apps.googleusercontent.com</text:span>)</text:p>
        </text:list-item>
        <text:list-item>
          <text:p text:style-name="P11"><text:soft-page-break/><text:span text:style-name="Strong_20_Emphasis">Your Client Secret</text:span> (Een geheime code)</text:p>
        </text:list-item>
      </text:list>
      <text:p text:style-name="Text_20_body"><text:span text:style-name="Emphasis">Sla deze pop-up op of laat dit tabblad even openstaan!</text:span></text:p>
      <text:h text:style-name="P2" text:outline-level="2">Stap 7: De gegevens invullen in Eventaflow</text:h>
      <text:p text:style-name="Text_20_body">Nu gaan we de sleutels koppelen aan jouw bedrijfsprofiel in de app.</text:p>
      <text:list text:style-name="L9">
        <text:list-item>
          <text:p text:style-name="P12">Open de Eventaflow-app in je browser en navigeer naar de pagina <text:span text:style-name="Strong_20_Emphasis">Bedrijf Beheer</text:span> (of de Google Instellingenpagina).</text:p>
        </text:list-item>
        <text:list-item>
          <text:p text:style-name="P12">Scroll naar de sectie <text:span text:style-name="Strong_20_Emphasis">Google Drive &amp; Documenten Integratie (OAuth2)</text:span>.</text:p>
        </text:list-item>
        <text:list-item>
          <text:p text:style-name="P12">Kopieer de <text:span text:style-name="Strong_20_Emphasis">Client ID</text:span> uit de Google Cloud pop-up en plak deze in het veld <text:span text:style-name="Source_20_Text">Google OAuth Client ID</text:span>.</text:p>
        </text:list-item>
        <text:list-item>
          <text:p text:style-name="P12">Kopieer de <text:span text:style-name="Strong_20_Emphasis">Client Secret</text:span> uit de Google Cloud pop-up en plak deze in het veld <text:span text:style-name="Source_20_Text">Google OAuth Client Secret</text:span>.</text:p>
        </text:list-item>
        <text:list-item>
          <text:p text:style-name="P12">Klik op de knop <text:span text:style-name="Strong_20_Emphasis">Credentials Opslaan</text:span>.</text:p>
        </text:list-item>
      </text:list>
      <text:h text:style-name="P2" text:outline-level="2">Stap 8: De koppeling definitief activeren!</text:h>
      <text:p text:style-name="Text_20_body">De sleutels zijn opgeslagen, nu gaan we daadwerkelijk inloggen.</text:p>
      <text:list text:style-name="L10">
        <text:list-item>
          <text:p text:style-name="P13">Er verschijnt nu een groene knop met de tekst <text:span text:style-name="Strong_20_Emphasis">Koppel Google Account</text:span>. Klik hierop.</text:p>
        </text:list-item>
        <text:list-item>
          <text:p text:style-name="P13">Je wordt doorgestuurd naar het vertrouwde inlogscherm van Google. Selecteer jouw Google-account.</text:p>
        </text:list-item>
        <text:list-item>
          <text:p text:style-name="P13"><text:span text:style-name="Strong_20_Emphasis">Belangrijke waarschuwing:</text:span> Omdat we de app zelf hebben aangemaakt en deze niet officieel door Google is geverifieerd (wat voor eigen gebruik ook niet nodig is), krijg je een waarschuwingsscherm te zien met de tekst <text:span text:style-name="Emphasis">"Google hasn't verified this app"</text:span> of <text:span text:style-name="Emphasis">"Geavanceerd: Google heeft deze app niet geverifieerd"</text:span>.</text:p>
          <text:list>
            <text:list-item>
              <text:p text:style-name="P13">Geen paniek, dit is volkomen safe. Klik op de link <text:span text:style-name="Strong_20_Emphasis">Advanced</text:span> (Geavanceerd) of <text:span text:style-name="Strong_20_Emphasis">Details</text:span> linksonder.</text:p>
            </text:list-item>
            <text:list-item>
              <text:p text:style-name="P13">Klik vervolgens op de link <text:span text:style-name="Strong_20_Emphasis">Go to Eventaflow Documenten (unsafe)</text:span> of <text:span text:style-name="Strong_20_Emphasis">Ga naar Eventaflow Documenten (onveilig)</text:span>.</text:p>
            </text:list-item>
          </text:list>
        </text:list-item>
        <text:list-item>
          <text:p text:style-name="P13">Vink op het volgende scherm alle selectievakjes aan (hiermee geef je Eventaflow toestemming om documenten aan te maken en te bewerken op je Drive) en klik op <text:span text:style-name="Strong_20_Emphasis">Continue</text:span> (Doorgaan).</text:p>
        </text:list-item>
        <text:list-item>
          <text:p text:style-name="P13">Je wordt nu teruggestuurd naar Eventaflow.</text:p>
        </text:list-item>
      </text:list>
      <text:p text:style-name="Text_20_body"><text:span text:style-name="Strong_20_Emphasis">Gefeliciteerd!</text:span> Je ziet nu een groene statusbalk met "Actief". Jouw Eventaflow-app is vanaf nu live gekoppeld aan je eigen Google Drive. Je kunt nu direct divisie-mappen genereren en samenwerken in live documente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ard3"/><text:page-number text:select-page="current">4</text:page-number><text:bookmark-end text:name="PageNumWizard_FOOTER_Standaard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6.2.2.2$Linux_X86_64 LibreOffice_project/620$Build-2</meta:generator>
    <dc:date>2026-06-13T20:05:47.986570287</dc:date>
    <meta:editing-duration>PT8H24M24S</meta:editing-duration>
    <meta:editing-cycles>2</meta:editing-cycles>
    <meta:print-date>2026-06-13T11:44:50.797501164</meta:print-date>
    <meta:document-statistic meta:table-count="0" meta:image-count="0" meta:object-count="0" meta:page-count="4" meta:paragraph-count="83" meta:word-count="1188" meta:character-count="7326" meta:non-whitespace-character-count="6278"/>
  </office:meta>
</office:document-meta>
</file>